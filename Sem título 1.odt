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C000002338D0BA60F.png" manifest:media-type="image/png"/>
  <manifest:file-entry manifest:full-path="Pictures/100000010000032C00000233B8DB9176.png" manifest:media-type="image/png"/>
  <manifest:file-entry manifest:full-path="Pictures/100000010000032C00000233B64937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x="0cm" svg:y="11.785cm" svg:width="17cm" svg:height="11.786cm" draw:z-index="1"><draw:image xlink:href="Pictures/100000010000032C00000233B649378E.png" xlink:type="simple" xlink:show="embed" xlink:actuate="onLoad" draw:mime-type="image/png"/></draw:frame><draw:frame draw:style-name="fr1" draw:name="Figura3" text:anchor-type="char" svg:x="0.12cm" svg:y="13.878cm" svg:width="17cm" svg:height="11.786cm" draw:z-index="2"><draw:image xlink:href="Pictures/100000010000032C00000233B8DB9176.png" xlink:type="simple" xlink:show="embed" xlink:actuate="onLoad" draw:mime-type="image/png"/></draw:frame><text:tab/><draw:frame draw:style-name="fr2" draw:name="Figura1" text:anchor-type="char" svg:width="17cm" svg:height="11.786cm" draw:z-index="0"><draw:image xlink:href="Pictures/100000010000032C000002338D0BA6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19:39:58.242109603</meta:creation-date>
    <meta:print-date>2026-06-09T19:41:17.772467834</meta:print-date>
    <meta:printed-by>Arquivos PDF</meta:printed-by>
    <dc:date>2026-06-09T19:41:55.131311630</dc:date>
    <meta:editing-duration>PT37S</meta:editing-duration>
    <meta:editing-cycles>1</meta:editing-cycles>
    <meta:document-statistic meta:table-count="0" meta:image-count="3" meta:object-count="0" meta:page-count="2" meta:paragraph-count="1" meta:word-count="0" meta:character-count="1" meta:non-whitespace-character-count="0"/>
    <meta:generator>LibreOffice/26.2.3.2$Linux_X86_64 LibreOffice_project/d4d5ed47b6084125f28d269a5650105d54dde034</meta:generator>
  </office:meta>
</office:document-meta>
</file>